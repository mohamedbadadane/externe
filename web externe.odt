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fr"&gt;</text:p>
      <text:p text:style-name="Standard">&lt;head&gt;</text:p>
      <text:p text:style-name="Standard">&lt;meta charset="UTF-8"/&gt;</text:p>
      <text:p text:style-name="Standard">&lt;meta name="viewport" content="width=device-width,initial-scale=1"/&gt;</text:p>
      <text:p text:style-name="Standard">&lt;title&gt;XTech.Green — Solutions IT durables&lt;/title&gt;</text:p>
      <text:p text:style-name="Standard">&lt;link rel="stylesheet" href="https://cdn.jsdelivr.net/npm/@tabler/icons-webfont@latest/tabler-icons.min.css"/&gt;</text:p>
      <text:p text:style-name="Standard">&lt;style&gt;</text:p>
      <text:p text:style-name="Standard">*,*::before,*::after{margin:0;padding:0;box-sizing:border-box;}</text:p>
      <text:p text:style-name="Standard">:root{</text:p>
      <text:p text:style-name="Standard"><text:s text:c="2"/>--g900:#0d3318;--g800:#155228;--g700:#1e7a3c;</text:p>
      <text:p text:style-name="Standard"><text:s text:c="2"/>--g600:#27a04f;--g500:#2ecc63;--g100:#d6f5e3;--g50:#edfaf3;</text:p>
      <text:p text:style-name="Standard"><text:s text:c="2"/>--white:#fff;--gray:#f5f7f5;--text:#111;--muted:#555;--light:#666;</text:p>
      <text:p text:style-name="Standard">}</text:p>
      <text:p text:style-name="Standard">body{font-family:system-ui,-apple-system,sans-serif;background:#fff;color:#111;font-size:14px;}</text:p>
      <text:p text:style-name="Standard">.nav{background:#fff;border-bottom:1px solid #dceedd;padding:0 2rem;height:58px;display:flex;align-items:center;justify-content:space-between;position:sticky;top:0;z-index:100;}</text:p>
      <text:p text:style-name="Standard">.logo{font-size:18px;font-weight:700;color:var(--g800);cursor:pointer;}</text:p>
      <text:p text:style-name="Standard">.logo .leaf{color:var(--g500);}</text:p>
      <text:p text:style-name="Standard">.nav ul{display:flex;gap:1.5rem;list-style:none;}</text:p>
      <text:p text:style-name="Standard">.nav ul a{font-size:13px;color:#555;text-decoration:none;cursor:pointer;padding:4px 0;border-bottom:2px solid transparent;transition:color .2s,border-color .2s;}</text:p>
      <text:p text:style-name="Standard">.nav ul a:hover,.nav ul a.active{color:var(--g700);border-bottom-color:var(--g500);}</text:p>
      <text:p text:style-name="Standard">.cta-nav{background:var(--g700);color:#fff;padding:7px 18px;border-radius:6px;font-size:13px;font-weight:600;text-decoration:none;cursor:pointer;border:none;}</text:p>
      <text:p text:style-name="Standard">.page{display:none;}</text:p>
      <text:p text:style-name="Standard">.page.active{display:block;}</text:p>
      <text:p text:style-name="Standard"/>
      <text:p text:style-name="Standard">/* HERO */</text:p>
      <text:p text:style-name="Standard">.hero{background:var(--g900);color:#fff;padding:3.5rem 2rem;text-align:center;}</text:p>
      <text:p text:style-name="Standard">.chip{background:rgba(46,204,99,.18);color:var(--g100);font-size:11px;font-weight:700;letter-spacing:.5px;text-transform:uppercase;padding:4px 14px;border-radius:20px;display:inline-block;margin-bottom:1rem;}</text:p>
      <text:p text:style-name="Standard">.hero h1{font-size:28px;font-weight:700;margin-bottom:.75rem;line-height:1.3;}</text:p>
      <text:p text:style-name="Standard">.hero h1 span{color:var(--g500);}</text:p>
      <text:p text:style-name="Standard">.hero p{font-size:14px;color:#9dcfad;max-width:480px;margin:0 auto 1.5rem;line-height:1.6;}</text:p>
      <text:p text:style-name="Standard">.btns{display:flex;gap:.75rem;justify-content:center;flex-wrap:wrap;}</text:p>
      <text:p text:style-name="Standard">.btn-primary{background:var(--g500);color:var(--g900);padding:10px 24px;border-radius:7px;font-size:13px;font-weight:700;text-decoration:none;cursor:pointer;border:none;}</text:p>
      <text:p text:style-name="Standard">.btn-outline{border:1px solid rgba(46,204,99,.4);color:var(--g100);padding:10px 24px;border-radius:7px;font-size:13px;text-decoration:none;cursor:pointer;background:transparent;}</text:p>
      <text:p text:style-name="Standard">.stats-bar{background:var(--g800);display:flex;justify-content:center;gap:3rem;padding:1.25rem 2rem;flex-wrap:wrap;}</text:p>
      <text:p text:style-name="Standard">.stat{text-align:center;}</text:p>
      <text:p text:style-name="Standard">.stat .num{font-size:22px;font-weight:700;color:var(--g500);}</text:p>
      <text:p text:style-name="Standard">.stat .lbl{font-size:11px;color:#7ab88a;margin-top:2px;}</text:p>
      <text:p text:style-name="Standard"/>
      <text:p text:style-name="Standard">/* SHARED */</text:p>
      <text:p text:style-name="Standard">.section{padding:2.5rem 2rem;}</text:p>
      <text:p text:style-name="Standard">.section.alt{background:var(--gray);}</text:p>
      <text:p text:style-name="Standard"><text:soft-page-break/>.section-h{text-align:center;margin-bottom:2rem;}</text:p>
      <text:p text:style-name="Standard">.section-h h2{font-size:20px;font-weight:700;color:var(--g800);}</text:p>
      <text:p text:style-name="Standard">.section-h p{font-size:13px;color:#666;margin-top:.35rem;}</text:p>
      <text:p text:style-name="Standard">.grid3{display:grid;grid-template-columns:repeat(3,1fr);gap:1rem;}</text:p>
      <text:p text:style-name="Standard">.grid2{display:grid;grid-template-columns:repeat(2,1fr);gap:1rem;}</text:p>
      <text:p text:style-name="Standard">.card{background:#fff;border:1px solid #dceedd;border-radius:10px;padding:1.25rem;}</text:p>
      <text:p text:style-name="Standard">.exp-icon{width:40px;height:40px;border-radius:9px;background:var(--g50);color:var(--g700);display:flex;align-items:center;justify-content:center;font-size:20px;margin-bottom:.75rem;}</text:p>
      <text:p text:style-name="Standard">.card h3{font-size:13px;font-weight:600;color:var(--g900);margin-bottom:.4rem;}</text:p>
      <text:p text:style-name="Standard">.card p{font-size:12px;color:#666;line-height:1.5;}</text:p>
      <text:p text:style-name="Standard"/>
      <text:p text:style-name="Standard">/* ABOUT */</text:p>
      <text:p text:style-name="Standard">.about-hero{background:var(--g900);color:#fff;padding:3rem 2rem;text-align:center;}</text:p>
      <text:p text:style-name="Standard">.about-hero h1{font-size:26px;font-weight:700;color:#fff;margin-bottom:.5rem;}</text:p>
      <text:p text:style-name="Standard">.about-hero p{font-size:14px;color:#9dcfad;max-width:520px;margin:0 auto;}</text:p>
      <text:p text:style-name="Standard">.about-lead{font-size:15px;line-height:1.8;color:#333;margin-bottom:1.5rem;}</text:p>
      <text:p text:style-name="Standard">.values-grid{display:grid;grid-template-columns:repeat(3,1fr);gap:1rem;margin-bottom:1.5rem;}</text:p>
      <text:p text:style-name="Standard">.val-card{background:var(--g50);border:1px solid #c5e8cf;border-radius:10px;padding:1.25rem;text-align:center;}</text:p>
      <text:p text:style-name="Standard">.val-card .vi{font-size:28px;color:var(--g600);margin-bottom:.5rem;}</text:p>
      <text:p text:style-name="Standard">.val-card h4{font-size:13px;font-weight:600;color:var(--g800);margin-bottom:.3rem;}</text:p>
      <text:p text:style-name="Standard">.val-card p{font-size:12px;color:#555;line-height:1.5;}</text:p>
      <text:p text:style-name="Standard">.timeline{position:relative;padding-left:2rem;}</text:p>
      <text:p text:style-name="Standard">.timeline::before{content:'';position:absolute;left:8px;top:0;bottom:0;width:2px;background:#c5e8cf;}</text:p>
      <text:p text:style-name="Standard">.tl-item{position:relative;margin-bottom:1.25rem;}</text:p>
      <text:p text:style-name="Standard">.tl-dot{position:absolute;left:-26px;top:3px;width:14px;height:14px;border-radius:50%;background:var(--g500);border:2px solid #fff;box-shadow:0 0 0 2px var(--g500);}</text:p>
      <text:p text:style-name="Standard">.tl-year{font-size:11px;font-weight:700;color:var(--g600);text-transform:uppercase;margin-bottom:2px;}</text:p>
      <text:p text:style-name="Standard">.tl-title{font-size:13px;font-weight:600;color:var(--g900);margin-bottom:2px;}</text:p>
      <text:p text:style-name="Standard">.tl-desc{font-size:12px;color:#666;line-height:1.5;}</text:p>
      <text:p text:style-name="Standard">.team-grid{display:grid;grid-template-columns:repeat(4,1fr);gap:1rem;}</text:p>
      <text:p text:style-name="Standard">.team-card{background:#fff;border:1px solid #dceedd;border-radius:10px;padding:1.1rem;text-align:center;}</text:p>
      <text:p text:style-name="Standard">.avatar{width:52px;height:52px;border-radius:50%;background:var(--g700);color:#fff;display:flex;align-items:center;justify-content:center;font-size:16px;font-weight:700;margin:0 auto .6rem;}</text:p>
      <text:p text:style-name="Standard">.team-card h4{font-size:13px;font-weight:600;color:var(--g900);}</text:p>
      <text:p text:style-name="Standard">.team-card p{font-size:11px;color:var(--g600);}</text:p>
      <text:p text:style-name="Standard"/>
      <text:p text:style-name="Standard">/* ORG */</text:p>
      <text:p text:style-name="Standard">.org-hero{background:var(--g900);color:#fff;padding:3rem 2rem;text-align:center;}</text:p>
      <text:p text:style-name="Standard">.org-hero h1{font-size:26px;font-weight:700;color:#fff;margin-bottom:.5rem;}</text:p>
      <text:p text:style-name="Standard">.org-hero p{font-size:14px;color:#9dcfad;max-width:500px;margin:0 auto;}</text:p>
      <text:p text:style-name="Standard">.org-wrap{display:flex;flex-direction:column;align-items:center;gap:.5rem;padding:2rem;}</text:p>
      <text:p text:style-name="Standard">.org-row{display:flex;gap:.75rem;justify-content:center;flex-wrap:wrap;}</text:p>
      <text:p text:style-name="Standard">.org-box{background:var(--g50);border:1px solid #b8e0c5;border-radius:8px;padding:.65rem 1.1rem;min-width:140px;text-align:center;transition:transform .2s,box-shadow .2s;}</text:p>
      <text:p text:style-name="Standard">.org-box:hover{transform:translateY(-2px);box-shadow:0 4px 12px rgba(30,122,60,.12);}</text:p>
      <text:p text:style-name="Standard">.org-box .n{font-size:12px;font-weight:600;color:var(--g800);}</text:p>
      <text:p text:style-name="Standard">.org-box .r{font-size:11px;color:var(--g600);margin-top:1px;}</text:p>
      <text:p text:style-name="Standard"><text:soft-page-break/>.org-box.ceo{background:var(--g800);border-color:var(--g700);}</text:p>
      <text:p text:style-name="Standard">.org-box.ceo .n{color:#fff;}</text:p>
      <text:p text:style-name="Standard">.org-box.ceo .r{color:var(--g100);}</text:p>
      <text:p text:style-name="Standard">.org-box.dir{background:var(--g50);border-color:var(--g600);}</text:p>
      <text:p text:style-name="Standard">.org-line{width:1px;height:20px;background:#b8e0c5;}</text:p>
      <text:p text:style-name="Standard">.org-dept{background:var(--g50);border:1px solid #dceedd;border-radius:12px;padding:1.5rem;margin:0 2rem 2rem;display:grid;grid-template-columns:repeat(3,1fr);gap:1rem;}</text:p>
      <text:p text:style-name="Standard">.dept-head{text-align:center;font-size:13px;font-weight:600;color:var(--g800);margin-bottom:.5rem;}</text:p>
      <text:p text:style-name="Standard">.dept-members{display:flex;flex-direction:column;gap:.4rem;}</text:p>
      <text:p text:style-name="Standard">.member-pill{background:#fff;border:1px solid #dceedd;border-radius:6px;padding:.4rem .75rem;font-size:11px;color:#555;text-align:center;}</text:p>
      <text:p text:style-name="Standard">.dept-col{background:#fff;border:1px solid #dceedd;border-radius:8px;padding:1rem;}</text:p>
      <text:p text:style-name="Standard">.dept-col h5{font-size:12px;font-weight:600;color:var(--g800);margin-bottom:.6rem;padding-bottom:.4rem;border-bottom:1px solid #edfaf3;}</text:p>
      <text:p text:style-name="Standard"/>
      <text:p text:style-name="Standard">/* NEWS */</text:p>
      <text:p text:style-name="Standard">.news-hero{background:var(--g900);color:#fff;padding:3rem 2rem;text-align:center;}</text:p>
      <text:p text:style-name="Standard">.news-hero h1{font-size:26px;font-weight:700;color:#fff;margin-bottom:.5rem;}</text:p>
      <text:p text:style-name="Standard">.news-hero p{font-size:14px;color:#9dcfad;max-width:500px;margin:0 auto;}</text:p>
      <text:p text:style-name="Standard">.news-filters{display:flex;gap:.5rem;justify-content:center;padding:1.5rem 2rem 0;flex-wrap:wrap;}</text:p>
      <text:p text:style-name="Standard">.filter-btn{padding:6px 16px;border-radius:20px;font-size:12px;font-weight:600;cursor:pointer;border:1px solid #dceedd;background:#fff;color:#555;transition:all .2s;}</text:p>
      <text:p text:style-name="Standard">.filter-btn.active,.filter-btn:hover{background:var(--g700);color:#fff;border-color:var(--g700);}</text:p>
      <text:p text:style-name="Standard">.news-grid{display:grid;grid-template-columns:repeat(3,1fr);gap:1rem;padding:1.5rem 2rem 2.5rem;}</text:p>
      <text:p text:style-name="Standard">.ni{background:#fff;border:1px solid #dceedd;border-radius:9px;padding:1.25rem;display:flex;flex-direction:column;gap:.4rem;transition:transform .2s,box-shadow .2s;}</text:p>
      <text:p text:style-name="Standard">.ni:hover{transform:translateY(-2px);box-shadow:0 4px 16px rgba(30,122,60,.1);}</text:p>
      <text:p text:style-name="Standard">.ni .tag{font-size:10px;text-transform:uppercase;font-weight:700;color:var(--g700);background:var(--g50);padding:2px 8px;border-radius:4px;display:inline-block;align-self:flex-start;}</text:p>
      <text:p text:style-name="Standard">.ni h4{font-size:13px;font-weight:600;color:#111;}</text:p>
      <text:p text:style-name="Standard">.ni p{font-size:12px;color:#666;line-height:1.5;flex:1;}</text:p>
      <text:p text:style-name="Standard">.ni .date{font-size:11px;color:#aaa;}</text:p>
      <text:p text:style-name="Standard">.ni .read-more{font-size:12px;color:var(--g600);text-decoration:none;font-weight:600;cursor:pointer;}</text:p>
      <text:p text:style-name="Standard">.ni.featured{grid-column:span 3;display:grid;grid-template-columns:1fr 2fr;gap:1.5rem;padding:1.5rem;}</text:p>
      <text:p text:style-name="Standard">.ni.featured .feat-img{background:linear-gradient(135deg,var(--g800),var(--g600));border-radius:8px;display:flex;align-items:center;justify-content:center;min-height:120px;}</text:p>
      <text:p text:style-name="Standard">.ni.featured .feat-img i{font-size:48px;color:rgba(255,255,255,.3);}</text:p>
      <text:p text:style-name="Standard">.ni.featured .feat-content{display:flex;flex-direction:column;gap:.5rem;}</text:p>
      <text:p text:style-name="Standard"/>
      <text:p text:style-name="Standard">/* CONTACT */</text:p>
      <text:p text:style-name="Standard">.contact-section{padding:2rem;background:var(--g800);color:#fff;display:grid;grid-template-columns:1fr 1fr;gap:2rem;}</text:p>
      <text:p text:style-name="Standard">.contact-section .full{grid-column:1/-1;text-align:center;}</text:p>
      <text:p text:style-name="Standard">.contact-section h2{font-size:17px;font-weight:600;margin-bottom:.25rem;}</text:p>
      <text:p text:style-name="Standard">.contact-section .sub{font-size:13px;color:#9dcfad;margin-top:.25rem;}</text:p>
      <text:p text:style-name="Standard">.contact-info p{font-size:13px;color:#c5e8cf;line-height:2.4;}</text:p>
      <text:p text:style-name="Standard"><text:soft-page-break/>.contact-info i{margin-right:8px;color:var(--g500);}</text:p>
      <text:p text:style-name="Standard">.contact-form input,.contact-form textarea{display:block;width:100%;background:rgba(255,255,255,.08);border:1px solid rgba(255,255,255,.2);border-radius:6px;padding:8px 12px;color:#fff;font-size:13px;margin-bottom:.5rem;outline:none;font-family:inherit;}</text:p>
      <text:p text:style-name="Standard">.contact-form textarea{height:80px;resize:none;}</text:p>
      <text:p text:style-name="Standard">.contact-form ::placeholder{color:rgba(255,255,255,.4);}</text:p>
      <text:p text:style-name="Standard">.contact-form button{background:var(--g500);color:var(--g900);border:none;padding:9px 20px;border-radius:6px;font-size:13px;font-weight:700;cursor:pointer;width:100%;}</text:p>
      <text:p text:style-name="Standard">.footer{background:var(--g900);color:#3d7a50;text-align:center;font-size:12px;padding:.7rem;}</text:p>
      <text:p text:style-name="Standard">&lt;/style&gt;</text:p>
      <text:p text:style-name="Standard">&lt;/head&gt;</text:p>
      <text:p text:style-name="Standard">&lt;body&gt;</text:p>
      <text:p text:style-name="Standard"/>
      <text:p text:style-name="Standard">&lt;nav class="nav"&gt;</text:p>
      <text:p text:style-name="Standard"><text:s text:c="2"/>&lt;div class="logo" onclick="goTo('home')"&gt;X&lt;span class="leaf"&gt;T&lt;/span&gt;ech.Green&lt;/div&gt;</text:p>
      <text:p text:style-name="Standard"><text:s text:c="2"/>&lt;ul&gt;</text:p>
      <text:p text:style-name="Standard"><text:s text:c="4"/>&lt;li&gt;&lt;a onclick="goTo('home')" id="nav-home" class="active"&gt;Accueil&lt;/a&gt;&lt;/li&gt;</text:p>
      <text:p text:style-name="Standard"><text:s text:c="4"/>&lt;li&gt;&lt;a onclick="goTo('about')" id="nav-about"&gt;À propos&lt;/a&gt;&lt;/li&gt;</text:p>
      <text:p text:style-name="Standard"><text:s text:c="4"/>&lt;li&gt;&lt;a onclick="goTo('org')" id="nav-org"&gt;Organigramme&lt;/a&gt;&lt;/li&gt;</text:p>
      <text:p text:style-name="Standard"><text:s text:c="4"/>&lt;li&gt;&lt;a onclick="goTo('news')" id="nav-news"&gt;News&lt;/a&gt;&lt;/li&gt;</text:p>
      <text:p text:style-name="Standard"><text:s text:c="2"/>&lt;/ul&gt;</text:p>
      <text:p text:style-name="Standard"><text:s text:c="2"/>&lt;button class="cta-nav" onclick="goTo('home')"&gt;Nous contacter&lt;/button&gt;</text:p>
      <text:p text:style-name="Standard">&lt;/nav&gt;</text:p>
      <text:p text:style-name="Standard"/>
      <text:p text:style-name="Standard">&lt;!-- PAGE ACCUEIL --&gt;</text:p>
      <text:p text:style-name="Standard">&lt;div class="page active" id="page-home"&gt;</text:p>
      <text:p text:style-name="Standard"><text:s text:c="2"/>&lt;div class="hero"&gt;</text:p>
      <text:p text:style-name="Standard"><text:s text:c="4"/>&lt;div class="chip"&gt;Startup tech · Paris&lt;/div&gt;</text:p>
      <text:p text:style-name="Standard"><text:s text:c="4"/>&lt;h1&gt;L'infrastructure IT,&lt;br&gt;&lt;span&gt;durable et fiable.&lt;/span&gt;&lt;/h1&gt;</text:p>
      <text:p text:style-name="Standard"><text:s text:c="4"/>&lt;p&gt;XTech.Green accompagne les entreprises dans leur transformation numérique avec des solutions open-source, sécurisées et éco-responsables.&lt;/p&gt;</text:p>
      <text:p text:style-name="Standard"><text:s text:c="4"/>&lt;div class="btns"&gt;</text:p>
      <text:p text:style-name="Standard"><text:s text:c="6"/>&lt;button class="btn-primary" onclick="goTo('about')"&gt;Découvrir nos services&lt;/button&gt;</text:p>
      <text:p text:style-name="Standard"><text:s text:c="6"/>&lt;button class="btn-outline" onclick="scrollContact()"&gt;Nous contacter&lt;/button&gt;</text:p>
      <text:p text:style-name="Standard"><text:s text:c="4"/>&lt;/div&gt;</text:p>
      <text:p text:style-name="Standard"><text:s text:c="2"/>&lt;/div&gt;</text:p>
      <text:p text:style-name="Standard"><text:s text:c="2"/>&lt;div class="stats-bar"&gt;</text:p>
      <text:p text:style-name="Standard"><text:s text:c="4"/>&lt;div class="stat"&gt;&lt;div class="num"&gt;99.9%&lt;/div&gt;&lt;div class="lbl"&gt;Disponibilité SLA&lt;/div&gt;&lt;/div&gt;</text:p>
      <text:p text:style-name="Standard"><text:s text:c="4"/>&lt;div class="stat"&gt;&lt;div class="num"&gt;50+&lt;/div&gt;&lt;div class="lbl"&gt;Clients accompagnés&lt;/div&gt;&lt;/div&gt;</text:p>
      <text:p text:style-name="Standard"><text:s text:c="4"/>&lt;div class="stat"&gt;&lt;div class="num"&gt;24/7&lt;/div&gt;&lt;div class="lbl"&gt;Supervision réseau&lt;/div&gt;&lt;/div&gt;</text:p>
      <text:p text:style-name="Standard"><text:s text:c="4"/>&lt;div class="stat"&gt;&lt;div class="num"&gt;0&lt;/div&gt;&lt;div class="lbl"&gt;Émission carbone nette&lt;/div&gt;&lt;/div&gt;</text:p>
      <text:p text:style-name="Standard"><text:s text:c="2"/>&lt;/div&gt;</text:p>
      <text:p text:style-name="Standard"><text:s text:c="2"/>&lt;div class="section alt"&gt;</text:p>
      <text:p text:style-name="Standard"><text:s text:c="4"/>&lt;div class="section-h"&gt;&lt;h2&gt;Nos expertises&lt;/h2&gt;&lt;p&gt;Des solutions adaptées à chaque besoin, de la virtualisation à la sécurité.&lt;/p&gt;&lt;/div&gt;</text:p>
      <text:p text:style-name="Standard"><text:s text:c="4"/>&lt;div class="grid3"&gt;</text:p>
      <text:p text:style-name="Standard"><text:soft-page-break/><text:s text:c="6"/>&lt;div class="card"&gt;&lt;div class="exp-icon"&gt;&lt;i class="ti ti-server"&gt;&lt;/i&gt;&lt;/div&gt;&lt;h3&gt;Infrastructure &amp; virtualisation&lt;/h3&gt;&lt;p&gt;Proxmox, Active Directory, gestion des accès, GPO et politiques de groupe.&lt;/p&gt;&lt;/div&gt;</text:p>
      <text:p text:style-name="Standard"><text:s text:c="6"/>&lt;div class="card"&gt;&lt;div class="exp-icon"&gt;&lt;i class="ti ti-shield-lock"&gt;&lt;/i&gt;&lt;/div&gt;&lt;h3&gt;Sécurité réseau&lt;/h3&gt;&lt;p&gt;Pare-feu pfSense, VPN, segmentation VLAN et journalisation des événements.&lt;/p&gt;&lt;/div&gt;</text:p>
      <text:p text:style-name="Standard"><text:s text:c="6"/>&lt;div class="card"&gt;&lt;div class="exp-icon"&gt;&lt;i class="ti ti-database"&gt;&lt;/i&gt;&lt;/div&gt;&lt;h3&gt;Sauvegarde &amp; PRA&lt;/h3&gt;&lt;p&gt;RAID, LVM, Veeam Backup et plan de reprise d'activité sur mesure.&lt;/p&gt;&lt;/div&gt;</text:p>
      <text:p text:style-name="Standard"><text:s text:c="4"/>&lt;/div&gt;</text:p>
      <text:p text:style-name="Standard"><text:s text:c="2"/>&lt;/div&gt;</text:p>
      <text:p text:style-name="Standard"><text:s text:c="2"/>&lt;div class="section"&gt;</text:p>
      <text:p text:style-name="Standard"><text:s text:c="4"/>&lt;div class="section-h"&gt;&lt;h2&gt;Actualités récentes&lt;/h2&gt;&lt;p&gt;Nos dernières nouvelles&lt;/p&gt;&lt;/div&gt;</text:p>
      <text:p text:style-name="Standard"><text:s text:c="4"/>&lt;div class="grid3"&gt;</text:p>
      <text:p text:style-name="Standard"><text:s text:c="6"/>&lt;div class="ni"&gt;&lt;span class="tag"&gt;Certification&lt;/span&gt;&lt;h4&gt;XTech.Green certifiée ISO 27001&lt;/h4&gt;&lt;p&gt;Notre infrastructure répond aux exigences de sécurité de la norme internationale.&lt;/p&gt;&lt;div class="date"&gt;Juin 2026&lt;/div&gt;&lt;/div&gt;</text:p>
      <text:p text:style-name="Standard"><text:s text:c="6"/>&lt;div class="ni"&gt;&lt;span class="tag"&gt;Expansion&lt;/span&gt;&lt;h4&gt;Nouveau datacenter à Paris&lt;/h4&gt;&lt;p&gt;Ouverture d'un second site pour renforcer notre résilience et capacité d'hébergement.&lt;/p&gt;&lt;div class="date"&gt;Mai 2026&lt;/div&gt;&lt;/div&gt;</text:p>
      <text:p text:style-name="Standard"><text:s text:c="6"/>&lt;div class="ni"&gt;&lt;span class="tag"&gt;Partenariat&lt;/span&gt;&lt;h4&gt;Partenaire Veeam Platinum&lt;/h4&gt;&lt;p&gt;XTech.Green devient partenaire Platinum Veeam pour les solutions de sauvegarde entreprise.&lt;/p&gt;&lt;div class="date"&gt;Avril 2026&lt;/div&gt;&lt;/div&gt;</text:p>
      <text:p text:style-name="Standard"><text:s text:c="4"/>&lt;/div&gt;</text:p>
      <text:p text:style-name="Standard"><text:s text:c="2"/>&lt;/div&gt;</text:p>
      <text:p text:style-name="Standard"><text:s text:c="2"/>&lt;div class="contact-section" id="contact"&gt;</text:p>
      <text:p text:style-name="Standard"><text:s text:c="4"/>&lt;div class="full"&gt;&lt;h2&gt;Nous contacter&lt;/h2&gt;&lt;p class="sub"&gt;Une question ? Un projet ? Notre équipe vous répond sous 24h.&lt;/p&gt;&lt;/div&gt;</text:p>
      <text:p text:style-name="Standard"><text:s text:c="4"/>&lt;div class="contact-info"&gt;</text:p>
      <text:p text:style-name="Standard"><text:s text:c="6"/>&lt;p&gt;&lt;i class="ti ti-map-pin"&gt;&lt;/i&gt;12 rue de l'Innovation, Paris 75001&lt;/p&gt;</text:p>
      <text:p text:style-name="Standard"><text:s text:c="6"/>&lt;p&gt;&lt;i class="ti ti-phone"&gt;&lt;/i&gt;+33 1 23 45 67 89&lt;/p&gt;</text:p>
      <text:p text:style-name="Standard"><text:s text:c="6"/>&lt;p&gt;&lt;i class="ti ti-mail"&gt;&lt;/i&gt;contact@xtech.green&lt;/p&gt;</text:p>
      <text:p text:style-name="Standard"><text:s text:c="6"/>&lt;p&gt;&lt;i class="ti ti-clock"&gt;&lt;/i&gt;Lun – Ven : 9h – 18h&lt;/p&gt;</text:p>
      <text:p text:style-name="Standard"><text:s text:c="6"/>&lt;p&gt;&lt;i class="ti ti-brand-linkedin"&gt;&lt;/i&gt;linkedin.com/company/xtech-green&lt;/p&gt;</text:p>
      <text:p text:style-name="Standard"><text:s text:c="4"/>&lt;/div&gt;</text:p>
      <text:p text:style-name="Standard"><text:s text:c="4"/>&lt;div class="contact-form"&gt;</text:p>
      <text:p text:style-name="Standard"><text:s text:c="6"/>&lt;input type="text" placeholder="Votre nom"/&gt;</text:p>
      <text:p text:style-name="Standard"><text:s text:c="6"/>&lt;input type="email" placeholder="Votre email"/&gt;</text:p>
      <text:p text:style-name="Standard"><text:s text:c="6"/>&lt;input type="text" placeholder="Votre entreprise"/&gt;</text:p>
      <text:p text:style-name="Standard"><text:s text:c="6"/>&lt;textarea placeholder="Votre message..."&gt;&lt;/textarea&gt;</text:p>
      <text:p text:style-name="Standard"><text:s text:c="6"/>&lt;button&gt;Envoyer le message&lt;/button&gt;</text:p>
      <text:p text:style-name="Standard"><text:s text:c="4"/>&lt;/div&gt;</text:p>
      <text:p text:style-name="Standard"><text:s text:c="2"/>&lt;/div&gt;</text:p>
      <text:p text:style-name="Standard"><text:s text:c="2"/>&lt;div class="footer"&gt;© 2026 XTech.Green — &lt;a href="#"&gt;Mentions légales&lt;/a&gt; — contact@xtech.green&lt;/div&gt;</text:p>
      <text:p text:style-name="Standard">&lt;/div&gt;</text:p>
      <text:p text:style-name="Standard"/>
      <text:p text:style-name="Standard">&lt;!-- PAGE À PROPOS --&gt;</text:p>
      <text:p text:style-name="Standard">&lt;div class="page" id="page-about"&gt;</text:p>
      <text:p text:style-name="Standard"><text:s text:c="2"/>&lt;div class="about-hero"&gt;</text:p>
      <text:p text:style-name="Standard"><text:s text:c="4"/>&lt;div class="chip"&gt;Notre histoire&lt;/div&gt;</text:p>
      <text:p text:style-name="Standard"><text:s text:c="4"/>&lt;h1&gt;Qui sommes-nous ?&lt;/h1&gt;</text:p>
      <text:p text:style-name="Standard"><text:soft-page-break/><text:s text:c="4"/>&lt;p&gt;Une startup parisienne qui réinvente l'infrastructure IT avec une approche éco-responsable et open-source.&lt;/p&gt;</text:p>
      <text:p text:style-name="Standard"><text:s text:c="2"/>&lt;/div&gt;</text:p>
      <text:p text:style-name="Standard"><text:s text:c="2"/>&lt;div class="section"&gt;</text:p>
      <text:p text:style-name="Standard"><text:s text:c="4"/>&lt;div class="grid2" style="align-items:start;"&gt;</text:p>
      <text:p text:style-name="Standard"><text:s text:c="6"/>&lt;div&gt;</text:p>
      <text:p text:style-name="Standard"><text:s text:c="8"/>&lt;p class="about-lead"&gt;Fondée en 2020, XTech.Green est née d'une conviction simple : il est possible de construire une infrastructure IT performante, sécurisée &lt;em&gt;et&lt;/em&gt; respectueuse de l'environnement.&lt;/p&gt;</text:p>
      <text:p text:style-name="Standard"><text:s text:c="8"/>&lt;p style="font-size:13px;color:#555;line-height:1.8;"&gt;Nous accompagnons des PME, des collectivités et des startups dans leur transformation numérique, en privilegiant les solutions open-source et les pratiques durables. Nos équipes d'ingénieurs certifiés interviennent sur l'ensemble du cycle de vie de votre infrastructure, de l'audit initial à la maintenance proactive.&lt;/p&gt;</text:p>
      <text:p text:style-name="Standard"><text:s text:c="6"/>&lt;/div&gt;</text:p>
      <text:p text:style-name="Standard"><text:s text:c="6"/>&lt;div&gt;</text:p>
      <text:p text:style-name="Standard"><text:s text:c="8"/>&lt;div class="card" style="background:var(--g50);border-color:#c5e8cf;"&gt;</text:p>
      <text:p text:style-name="Standard"><text:s text:c="10"/>&lt;div class="exp-icon"&gt;&lt;i class="ti ti-leaf"&gt;&lt;/i&gt;&lt;/div&gt;</text:p>
      <text:p text:style-name="Standard"><text:s text:c="10"/>&lt;h3&gt;Notre mission&lt;/h3&gt;</text:p>
      <text:p text:style-name="Standard"><text:s text:c="10"/>&lt;p&gt;Rendre l'IT durable accessible à toutes les organisations, quelle que soit leur taille, grâce à des solutions open-source éprouvées et un accompagnement humain de qualité.&lt;/p&gt;</text:p>
      <text:p text:style-name="Standard"><text:s text:c="8"/>&lt;/div&gt;</text:p>
      <text:p text:style-name="Standard"><text:s text:c="6"/>&lt;/div&gt;</text:p>
      <text:p text:style-name="Standard"><text:s text:c="4"/>&lt;/div&gt;</text:p>
      <text:p text:style-name="Standard"><text:s text:c="2"/>&lt;/div&gt;</text:p>
      <text:p text:style-name="Standard"><text:s text:c="2"/>&lt;div class="section alt"&gt;</text:p>
      <text:p text:style-name="Standard"><text:s text:c="4"/>&lt;div class="section-h"&gt;&lt;h2&gt;Nos valeurs&lt;/h2&gt;&lt;p&gt;Ce qui guide chacune de nos décisions&lt;/p&gt;&lt;/div&gt;</text:p>
      <text:p text:style-name="Standard"><text:s text:c="4"/>&lt;div class="values-grid"&gt;</text:p>
      <text:p text:style-name="Standard"><text:s text:c="6"/>&lt;div class="val-card"&gt;&lt;div class="vi"&gt;&lt;i class="ti ti-leaf"&gt;&lt;/i&gt;&lt;/div&gt;&lt;h4&gt;Éco-responsabilité&lt;/h4&gt;&lt;p&gt;Chaque solution est pensée pour minimiser l'impact environnemental, du choix du matériel à la consommation énergétique.&lt;/p&gt;&lt;/div&gt;</text:p>
      <text:p text:style-name="Standard"><text:s text:c="6"/>&lt;div class="val-card"&gt;&lt;div class="vi"&gt;&lt;i class="ti ti-shield-check"&gt;&lt;/i&gt;&lt;/div&gt;&lt;h4&gt;Sécurité d'abord&lt;/h4&gt;&lt;p&gt;La sécurité n'est pas une option. Nous intégrons les meilleures pratiques dès la conception de chaque projet.&lt;/p&gt;&lt;/div&gt;</text:p>
      <text:p text:style-name="Standard"><text:s text:c="6"/>&lt;div class="val-card"&gt;&lt;div class="vi"&gt;&lt;i class="ti ti-source-code"&gt;&lt;/i&gt;&lt;/div&gt;&lt;h4&gt;Open source&lt;/h4&gt;&lt;p&gt;Nous croyons à la transparence et à la liberté technologique. Nos solutions s'appuient sur des outils communautaires éprouvés.&lt;/p&gt;&lt;/div&gt;</text:p>
      <text:p text:style-name="Standard"><text:s text:c="4"/>&lt;/div&gt;</text:p>
      <text:p text:style-name="Standard"><text:s text:c="2"/>&lt;/div&gt;</text:p>
      <text:p text:style-name="Standard"><text:s text:c="2"/>&lt;div class="section"&gt;</text:p>
      <text:p text:style-name="Standard"><text:s text:c="4"/>&lt;div class="grid2" style="align-items:start;"&gt;</text:p>
      <text:p text:style-name="Standard"><text:s text:c="6"/>&lt;div&gt;</text:p>
      <text:p text:style-name="Standard"><text:s text:c="8"/>&lt;div class="section-h" style="text-align:left;margin-bottom:1.25rem;"&gt;&lt;h2&gt;Notre parcours&lt;/h2&gt;&lt;/div&gt;</text:p>
      <text:p text:style-name="Standard"><text:s text:c="8"/>&lt;div class="timeline"&gt;</text:p>
      <text:p text:style-name="Standard"><text:s text:c="10"/>&lt;div class="tl-item"&gt;&lt;div class="tl-dot"&gt;&lt;/div&gt;&lt;div class="tl-year"&gt;2020&lt;/div&gt;&lt;div class="tl-title"&gt;Fondation&lt;/div&gt;&lt;div class="tl-desc"&gt;Création de XTech.Green par trois ingénieurs réseau avec une vision commune : l'IT responsable.&lt;/div&gt;&lt;/div&gt;</text:p>
      <text:p text:style-name="Standard"><text:s text:c="10"/>&lt;div class="tl-item"&gt;&lt;div class="tl-dot"&gt;&lt;/div&gt;&lt;div class="tl-year"&gt;2021&lt;/div&gt;&lt;div class="tl-title"&gt;Premier datacenter&lt;/div&gt;&lt;div class="tl-desc"&gt;Ouverture de notre premier site d'hébergement à Paris, alimenté à 100% par des énergies renouvelables.&lt;/div&gt;&lt;/div&gt;</text:p>
      <text:p text:style-name="Standard"><text:soft-page-break/><text:s text:c="10"/>&lt;div class="tl-item"&gt;&lt;div class="tl-dot"&gt;&lt;/div&gt;&lt;div class="tl-year"&gt;2022&lt;/div&gt;&lt;div class="tl-title"&gt;Certification ISO 27001&lt;/div&gt;&lt;div class="tl-desc"&gt;Obtention de la certification internationale de sécurité de l'information.&lt;/div&gt;&lt;/div&gt;</text:p>
      <text:p text:style-name="Standard"><text:s text:c="10"/>&lt;div class="tl-item"&gt;&lt;div class="tl-dot"&gt;&lt;/div&gt;&lt;div class="tl-year"&gt;2023&lt;/div&gt;&lt;div class="tl-title"&gt;50 clients franchis&lt;/div&gt;&lt;div class="tl-desc"&gt;Dépassement du cap des 50 clients accompagnés, de la TPE au grand compte.&lt;/div&gt;&lt;/div&gt;</text:p>
      <text:p text:style-name="Standard"><text:s text:c="10"/>&lt;div class="tl-item"&gt;&lt;div class="tl-dot"&gt;&lt;/div&gt;&lt;div class="tl-year"&gt;2026&lt;/div&gt;&lt;div class="tl-title"&gt;Partenaire Veeam Platinum&lt;/div&gt;&lt;div class="tl-desc"&gt;Reconnaissance de notre expertise en solutions de sauvegarde et PRA entreprise.&lt;/div&gt;&lt;/div&gt;</text:p>
      <text:p text:style-name="Standard"><text:s text:c="8"/>&lt;/div&gt;</text:p>
      <text:p text:style-name="Standard"><text:s text:c="6"/>&lt;/div&gt;</text:p>
      <text:p text:style-name="Standard"><text:s text:c="6"/>&lt;div&gt;</text:p>
      <text:p text:style-name="Standard"><text:s text:c="8"/>&lt;div class="section-h" style="text-align:left;margin-bottom:1.25rem;"&gt;&lt;h2&gt;L'équipe&lt;/h2&gt;&lt;/div&gt;</text:p>
      <text:p text:style-name="Standard"><text:s text:c="8"/>&lt;div style="display:grid;grid-template-columns:1fr 1fr;gap:.75rem;"&gt;</text:p>
      <text:p text:style-name="Standard"><text:s text:c="10"/>&lt;div class="team-card"&gt;&lt;div class="avatar"&gt;AL&lt;/div&gt;&lt;h4&gt;Alexandre Leroy&lt;/h4&gt;&lt;p&gt;CEO &amp; Co-fondateur&lt;/p&gt;&lt;/div&gt;</text:p>
      <text:p text:style-name="Standard"><text:s text:c="10"/>&lt;div class="team-card"&gt;&lt;div class="avatar" style="background:var(--g600);"&gt;SM&lt;/div&gt;&lt;h4&gt;Sophie Martin&lt;/h4&gt;&lt;p&gt;DSI&lt;/p&gt;&lt;/div&gt;</text:p>
      <text:p text:style-name="Standard"><text:s text:c="10"/>&lt;div class="team-card"&gt;&lt;div class="avatar" style="background:var(--g500);color:var(--g900);"&gt;JD&lt;/div&gt;&lt;h4&gt;Julien Dupont&lt;/h4&gt;&lt;p&gt;Ingénieur réseau&lt;/p&gt;&lt;/div&gt;</text:p>
      <text:p text:style-name="Standard"><text:s text:c="10"/>&lt;div class="team-card"&gt;&lt;div class="avatar" style="background:#155228;"&gt;CB&lt;/div&gt;&lt;h4&gt;Claire Besson&lt;/h4&gt;&lt;p&gt;RH &amp; Opérations&lt;/p&gt;&lt;/div&gt;</text:p>
      <text:p text:style-name="Standard"><text:s text:c="8"/>&lt;/div&gt;</text:p>
      <text:p text:style-name="Standard"><text:s text:c="6"/>&lt;/div&gt;</text:p>
      <text:p text:style-name="Standard"><text:s text:c="4"/>&lt;/div&gt;</text:p>
      <text:p text:style-name="Standard"><text:s text:c="2"/>&lt;/div&gt;</text:p>
      <text:p text:style-name="Standard"><text:s text:c="2"/>&lt;div class="contact-section"&gt;</text:p>
      <text:p text:style-name="Standard"><text:s text:c="4"/>&lt;div class="full"&gt;&lt;h2&gt;Nous contacter&lt;/h2&gt;&lt;p class="sub"&gt;Une question ? Un projet ? Notre équipe vous répond sous 24h.&lt;/p&gt;&lt;/div&gt;</text:p>
      <text:p text:style-name="Standard"><text:s text:c="4"/>&lt;div class="contact-info"&gt;</text:p>
      <text:p text:style-name="Standard"><text:s text:c="6"/>&lt;p&gt;&lt;i class="ti ti-map-pin"&gt;&lt;/i&gt;12 rue de l'Innovation, Paris 75001&lt;/p&gt;</text:p>
      <text:p text:style-name="Standard"><text:s text:c="6"/>&lt;p&gt;&lt;i class="ti ti-phone"&gt;&lt;/i&gt;+33 1 23 45 67 89&lt;/p&gt;</text:p>
      <text:p text:style-name="Standard"><text:s text:c="6"/>&lt;p&gt;&lt;i class="ti ti-mail"&gt;&lt;/i&gt;contact@xtech.green&lt;/p&gt;</text:p>
      <text:p text:style-name="Standard"><text:s text:c="6"/>&lt;p&gt;&lt;i class="ti ti-clock"&gt;&lt;/i&gt;Lun – Ven : 9h – 18h&lt;/p&gt;</text:p>
      <text:p text:style-name="Standard"><text:s text:c="4"/>&lt;/div&gt;</text:p>
      <text:p text:style-name="Standard"><text:s text:c="4"/>&lt;div class="contact-form"&gt;</text:p>
      <text:p text:style-name="Standard"><text:s text:c="6"/>&lt;input type="text" placeholder="Votre nom"/&gt;</text:p>
      <text:p text:style-name="Standard"><text:s text:c="6"/>&lt;input type="email" placeholder="Votre email"/&gt;</text:p>
      <text:p text:style-name="Standard"><text:s text:c="6"/>&lt;input type="text" placeholder="Votre entreprise"/&gt;</text:p>
      <text:p text:style-name="Standard"><text:s text:c="6"/>&lt;textarea placeholder="Votre message..."&gt;&lt;/textarea&gt;</text:p>
      <text:p text:style-name="Standard"><text:s text:c="6"/>&lt;button&gt;Envoyer le message&lt;/button&gt;</text:p>
      <text:p text:style-name="Standard"><text:s text:c="4"/>&lt;/div&gt;</text:p>
      <text:p text:style-name="Standard"><text:s text:c="2"/>&lt;/div&gt;</text:p>
      <text:p text:style-name="Standard"><text:s text:c="2"/>&lt;div class="footer"&gt;© 2026 XTech.Green — &lt;a href="#"&gt;Mentions légales&lt;/a&gt; — contact@xtech.green&lt;/div&gt;</text:p>
      <text:p text:style-name="Standard">&lt;/div&gt;</text:p>
      <text:p text:style-name="Standard"/>
      <text:p text:style-name="Standard">&lt;!-- PAGE ORGANIGRAMME --&gt;</text:p>
      <text:p text:style-name="Standard">&lt;div class="page" id="page-org"&gt;</text:p>
      <text:p text:style-name="Standard"><text:s text:c="2"/>&lt;div class="org-hero"&gt;</text:p>
      <text:p text:style-name="Standard"><text:s text:c="4"/>&lt;div class="chip"&gt;Structure&lt;/div&gt;</text:p>
      <text:p text:style-name="Standard"><text:soft-page-break/><text:s text:c="4"/>&lt;h1&gt;Organigramme&lt;/h1&gt;</text:p>
      <text:p text:style-name="Standard"><text:s text:c="4"/>&lt;p&gt;Organisation interne de XTech.Green — des équipes agiles au service de votre infrastructure.&lt;/p&gt;</text:p>
      <text:p text:style-name="Standard"><text:s text:c="2"/>&lt;/div&gt;</text:p>
      <text:p text:style-name="Standard"><text:s text:c="2"/>&lt;div style="padding:2rem 2rem 0;text-align:center;"&gt;</text:p>
      <text:p text:style-name="Standard"><text:s text:c="4"/>&lt;p style="font-size:13px;color:#666;margin-bottom:1.5rem;"&gt;15 collaborateurs · 3 pôles métiers · 1 vision commune&lt;/p&gt;</text:p>
      <text:p text:style-name="Standard"><text:s text:c="2"/>&lt;/div&gt;</text:p>
      <text:p text:style-name="Standard"><text:s text:c="2"/>&lt;div class="org-wrap"&gt;</text:p>
      <text:p text:style-name="Standard"><text:s text:c="4"/>&lt;div class="org-row"&gt;</text:p>
      <text:p text:style-name="Standard"><text:s text:c="6"/>&lt;div class="org-box ceo"&gt;&lt;div class="n"&gt;Direction générale&lt;/div&gt;&lt;div class="r"&gt;Alexandre Leroy · CEO&lt;/div&gt;&lt;/div&gt;</text:p>
      <text:p text:style-name="Standard"><text:s text:c="4"/>&lt;/div&gt;</text:p>
      <text:p text:style-name="Standard"><text:s text:c="4"/>&lt;div class="org-line"&gt;&lt;/div&gt;</text:p>
      <text:p text:style-name="Standard"><text:s text:c="4"/>&lt;div class="org-row"&gt;</text:p>
      <text:p text:style-name="Standard"><text:s text:c="6"/>&lt;div class="org-box dir"&gt;&lt;div class="n"&gt;DSI&lt;/div&gt;&lt;div class="r"&gt;Sophie Martin&lt;/div&gt;&lt;/div&gt;</text:p>
      <text:p text:style-name="Standard"><text:s text:c="6"/>&lt;div class="org-box dir"&gt;&lt;div class="n"&gt;RH &amp; Opérations&lt;/div&gt;&lt;div class="r"&gt;Claire Besson&lt;/div&gt;&lt;/div&gt;</text:p>
      <text:p text:style-name="Standard"><text:s text:c="6"/>&lt;div class="org-box dir"&gt;&lt;div class="n"&gt;Commercial&lt;/div&gt;&lt;div class="r"&gt;Marc Fontaine&lt;/div&gt;&lt;/div&gt;</text:p>
      <text:p text:style-name="Standard"><text:s text:c="4"/>&lt;/div&gt;</text:p>
      <text:p text:style-name="Standard"><text:s text:c="4"/>&lt;div class="org-line"&gt;&lt;/div&gt;</text:p>
      <text:p text:style-name="Standard"><text:s text:c="2"/>&lt;/div&gt;</text:p>
      <text:p text:style-name="Standard"><text:s text:c="2"/>&lt;div class="org-dept"&gt;</text:p>
      <text:p text:style-name="Standard"><text:s text:c="4"/>&lt;div class="dept-col"&gt;</text:p>
      <text:p text:style-name="Standard"><text:s text:c="6"/>&lt;h5&gt;&lt;i class="ti ti-server" style="color:var(--g600);margin-right:6px;"&gt;&lt;/i&gt;Infra &amp; Systèmes&lt;/h5&gt;</text:p>
      <text:p text:style-name="Standard"><text:s text:c="6"/>&lt;div class="dept-members"&gt;</text:p>
      <text:p text:style-name="Standard"><text:s text:c="8"/>&lt;div class="member-pill"&gt;Julien Dupont · Admin sys&lt;/div&gt;</text:p>
      <text:p text:style-name="Standard"><text:s text:c="8"/>&lt;div class="member-pill"&gt;Nadia Okafor · Admin sys&lt;/div&gt;</text:p>
      <text:p text:style-name="Standard"><text:s text:c="8"/>&lt;div class="member-pill"&gt;Pierre Vidal · Virtualisation&lt;/div&gt;</text:p>
      <text:p text:style-name="Standard"><text:s text:c="8"/>&lt;div class="member-pill"&gt;Emma Charpentier · Cloud&lt;/div&gt;</text:p>
      <text:p text:style-name="Standard"><text:s text:c="6"/>&lt;/div&gt;</text:p>
      <text:p text:style-name="Standard"><text:s text:c="4"/>&lt;/div&gt;</text:p>
      <text:p text:style-name="Standard"><text:s text:c="4"/>&lt;div class="dept-col"&gt;</text:p>
      <text:p text:style-name="Standard"><text:s text:c="6"/>&lt;h5&gt;&lt;i class="ti ti-shield-lock" style="color:var(--g600);margin-right:6px;"&gt;&lt;/i&gt;Réseau &amp; Sécurité&lt;/h5&gt;</text:p>
      <text:p text:style-name="Standard"><text:s text:c="6"/>&lt;div class="dept-members"&gt;</text:p>
      <text:p text:style-name="Standard"><text:s text:c="8"/>&lt;div class="member-pill"&gt;Thomas Renaud · Ingénieur réseau&lt;/div&gt;</text:p>
      <text:p text:style-name="Standard"><text:s text:c="8"/>&lt;div class="member-pill"&gt;Yasmine Talbi · Firewall &amp; VPN&lt;/div&gt;</text:p>
      <text:p text:style-name="Standard"><text:s text:c="8"/>&lt;div class="member-pill"&gt;Romain Gest · SOC analyst&lt;/div&gt;</text:p>
      <text:p text:style-name="Standard"><text:s text:c="6"/>&lt;/div&gt;</text:p>
      <text:p text:style-name="Standard"><text:s text:c="4"/>&lt;/div&gt;</text:p>
      <text:p text:style-name="Standard"><text:s text:c="4"/>&lt;div class="dept-col"&gt;</text:p>
      <text:p text:style-name="Standard"><text:s text:c="6"/>&lt;h5&gt;&lt;i class="ti ti-headset" style="color:var(--g600);margin-right:6px;"&gt;&lt;/i&gt;Support N1 / N2&lt;/h5&gt;</text:p>
      <text:p text:style-name="Standard"><text:s text:c="6"/>&lt;div class="dept-members"&gt;</text:p>
      <text:p text:style-name="Standard"><text:s text:c="8"/>&lt;div class="member-pill"&gt;Lucie Bernard · N2 technicienne&lt;/div&gt;</text:p>
      <text:p text:style-name="Standard"><text:s text:c="8"/>&lt;div class="member-pill"&gt;Karim Messai · N1 support&lt;/div&gt;</text:p>
      <text:p text:style-name="Standard"><text:s text:c="8"/>&lt;div class="member-pill"&gt;Anaïs Moreau · N1 support&lt;/div&gt;</text:p>
      <text:p text:style-name="Standard"><text:s text:c="6"/>&lt;/div&gt;</text:p>
      <text:p text:style-name="Standard"><text:soft-page-break/><text:s text:c="4"/>&lt;/div&gt;</text:p>
      <text:p text:style-name="Standard"><text:s text:c="2"/>&lt;/div&gt;</text:p>
      <text:p text:style-name="Standard"><text:s text:c="2"/>&lt;div class="section alt"&gt;</text:p>
      <text:p text:style-name="Standard"><text:s text:c="4"/>&lt;div class="section-h"&gt;&lt;h2&gt;Répartition des effectifs&lt;/h2&gt;&lt;p&gt;Par pôle métier&lt;/p&gt;&lt;/div&gt;</text:p>
      <text:p text:style-name="Standard"><text:s text:c="4"/>&lt;div class="grid3"&gt;</text:p>
      <text:p text:style-name="Standard"><text:s text:c="6"/>&lt;div class="card" style="text-align:center;"&gt;</text:p>
      <text:p text:style-name="Standard"><text:s text:c="8"/>&lt;div class="exp-icon" style="margin:0 auto .75rem;"&gt;&lt;i class="ti ti-server"&gt;&lt;/i&gt;&lt;/div&gt;</text:p>
      <text:p text:style-name="Standard"><text:s text:c="8"/>&lt;h3&gt;Infra &amp; Systèmes&lt;/h3&gt;</text:p>
      <text:p text:style-name="Standard"><text:s text:c="8"/>&lt;p style="font-size:22px;font-weight:700;color:var(--g500);margin:.5rem 0 .25rem;"&gt;4&lt;/p&gt;</text:p>
      <text:p text:style-name="Standard"><text:s text:c="8"/>&lt;p&gt;Administrateurs systèmes et ingénieurs cloud, garants de la disponibilité 24/7.&lt;/p&gt;</text:p>
      <text:p text:style-name="Standard"><text:s text:c="6"/>&lt;/div&gt;</text:p>
      <text:p text:style-name="Standard"><text:s text:c="6"/>&lt;div class="card" style="text-align:center;"&gt;</text:p>
      <text:p text:style-name="Standard"><text:s text:c="8"/>&lt;div class="exp-icon" style="margin:0 auto .75rem;"&gt;&lt;i class="ti ti-shield-lock"&gt;&lt;/i&gt;&lt;/div&gt;</text:p>
      <text:p text:style-name="Standard"><text:s text:c="8"/>&lt;h3&gt;Réseau &amp; Sécurité&lt;/h3&gt;</text:p>
      <text:p text:style-name="Standard"><text:s text:c="8"/>&lt;p style="font-size:22px;font-weight:700;color:var(--g500);margin:.5rem 0 .25rem;"&gt;3&lt;/p&gt;</text:p>
      <text:p text:style-name="Standard"><text:s text:c="8"/>&lt;p&gt;Experts en firewall, VPN et supervision sécurité des infrastructures clientes.&lt;/p&gt;</text:p>
      <text:p text:style-name="Standard"><text:s text:c="6"/>&lt;/div&gt;</text:p>
      <text:p text:style-name="Standard"><text:s text:c="6"/>&lt;div class="card" style="text-align:center;"&gt;</text:p>
      <text:p text:style-name="Standard"><text:s text:c="8"/>&lt;div class="exp-icon" style="margin:0 auto .75rem;"&gt;&lt;i class="ti ti-headset"&gt;&lt;/i&gt;&lt;/div&gt;</text:p>
      <text:p text:style-name="Standard"><text:s text:c="8"/>&lt;h3&gt;Support N1/N2&lt;/h3&gt;</text:p>
      <text:p text:style-name="Standard"><text:s text:c="8"/>&lt;p style="font-size:22px;font-weight:700;color:var(--g500);margin:.5rem 0 .25rem;"&gt;3&lt;/p&gt;</text:p>
      <text:p text:style-name="Standard"><text:s text:c="8"/>&lt;p&gt;Techniciens de proximité et support de niveau 2 pour les incidents complexes.&lt;/p&gt;</text:p>
      <text:p text:style-name="Standard"><text:s text:c="6"/>&lt;/div&gt;</text:p>
      <text:p text:style-name="Standard"><text:s text:c="4"/>&lt;/div&gt;</text:p>
      <text:p text:style-name="Standard"><text:s text:c="2"/>&lt;/div&gt;</text:p>
      <text:p text:style-name="Standard"><text:s text:c="2"/>&lt;div class="footer"&gt;© 2026 XTech.Green — &lt;a href="#"&gt;Mentions légales&lt;/a&gt; — contact@xtech.green&lt;/div&gt;</text:p>
      <text:p text:style-name="Standard">&lt;/div&gt;</text:p>
      <text:p text:style-name="Standard"/>
      <text:p text:style-name="Standard">&lt;!-- PAGE NEWS --&gt;</text:p>
      <text:p text:style-name="Standard">&lt;div class="page" id="page-news"&gt;</text:p>
      <text:p text:style-name="Standard"><text:s text:c="2"/>&lt;div class="news-hero"&gt;</text:p>
      <text:p text:style-name="Standard"><text:s text:c="4"/>&lt;div class="chip"&gt;Actualités&lt;/div&gt;</text:p>
      <text:p text:style-name="Standard"><text:s text:c="4"/>&lt;h1&gt;Les dernières nouvelles&lt;/h1&gt;</text:p>
      <text:p text:style-name="Standard"><text:s text:c="4"/>&lt;p&gt;Certifications, partenariats, expansion — suivez l'évolution de XTech.Green.&lt;/p&gt;</text:p>
      <text:p text:style-name="Standard"><text:s text:c="2"/>&lt;/div&gt;</text:p>
      <text:p text:style-name="Standard"><text:s text:c="2"/>&lt;div class="news-filters"&gt;</text:p>
      <text:p text:style-name="Standard"><text:s text:c="4"/>&lt;button class="filter-btn active" onclick="filterNews('all',this)"&gt;Toutes&lt;/button&gt;</text:p>
      <text:p text:style-name="Standard"><text:s text:c="4"/>&lt;button class="filter-btn" onclick="filterNews('certification',this)"&gt;Certification&lt;/button&gt;</text:p>
      <text:p text:style-name="Standard"><text:s text:c="4"/>&lt;button class="filter-btn" onclick="filterNews('expansion',this)"&gt;Expansion&lt;/button&gt;</text:p>
      <text:p text:style-name="Standard"><text:s text:c="4"/>&lt;button class="filter-btn" onclick="filterNews('partenariat',this)"&gt;Partenariat&lt;/button&gt;</text:p>
      <text:p text:style-name="Standard"><text:s text:c="4"/>&lt;button class="filter-btn" onclick="filterNews('securite',this)"&gt;Sécurité&lt;/button&gt;</text:p>
      <text:p text:style-name="Standard"><text:s text:c="2"/>&lt;/div&gt;</text:p>
      <text:p text:style-name="Standard"><text:s text:c="2"/>&lt;div class="news-grid" id="news-grid"&gt;</text:p>
      <text:p text:style-name="Standard"><text:s text:c="4"/>&lt;div class="ni featured" data-cat="certification"&gt;</text:p>
      <text:p text:style-name="Standard"><text:s text:c="6"/>&lt;div class="feat-img"&gt;&lt;i class="ti ti-certificate"&gt;&lt;/i&gt;&lt;/div&gt;</text:p>
      <text:p text:style-name="Standard"><text:s text:c="6"/>&lt;div class="feat-content"&gt;</text:p>
      <text:p text:style-name="Standard"><text:s text:c="8"/>&lt;span class="tag"&gt;Certification&lt;/span&gt;</text:p>
      <text:p text:style-name="Standard"><text:s text:c="8"/>&lt;h4 style="font-size:16px;"&gt;XTech.Green certifiée ISO 27001&lt;/h4&gt;</text:p>
      <text:p text:style-name="Standard"><text:s text:c="8"/>&lt;p&gt;Notre infrastructure et nos processus répondent désormais aux plus hautes exigences de la norme internationale de sécurité de l'information. Un audit complet de 6 mois, réalisé par un organisme accrédité, a validé l'ensemble de notre système de management de la sécurité.&lt;/p&gt;</text:p>
      <text:p text:style-name="Standard"><text:soft-page-break/><text:s text:c="8"/>&lt;div class="date"&gt;Juin 2026&lt;/div&gt;</text:p>
      <text:p text:style-name="Standard"><text:s text:c="8"/>&lt;a class="read-more"&gt;Lire l'article →&lt;/a&gt;</text:p>
      <text:p text:style-name="Standard"><text:s text:c="6"/>&lt;/div&gt;</text:p>
      <text:p text:style-name="Standard"><text:s text:c="4"/>&lt;/div&gt;</text:p>
      <text:p text:style-name="Standard"><text:s text:c="4"/>&lt;div class="ni" data-cat="expansion"&gt;</text:p>
      <text:p text:style-name="Standard"><text:s text:c="6"/>&lt;span class="tag"&gt;Expansion&lt;/span&gt;</text:p>
      <text:p text:style-name="Standard"><text:s text:c="6"/>&lt;h4&gt;Nouveau datacenter à Paris&lt;/h4&gt;</text:p>
      <text:p text:style-name="Standard"><text:s text:c="6"/>&lt;p&gt;Ouverture d'un second site d'hébergement pour renforcer notre résilience et doubler notre capacité.&lt;/p&gt;</text:p>
      <text:p text:style-name="Standard"><text:s text:c="6"/>&lt;div class="date"&gt;Mai 2026&lt;/div&gt;</text:p>
      <text:p text:style-name="Standard"><text:s text:c="6"/>&lt;a class="read-more"&gt;Lire →&lt;/a&gt;</text:p>
      <text:p text:style-name="Standard"><text:s text:c="4"/>&lt;/div&gt;</text:p>
      <text:p text:style-name="Standard"><text:s text:c="4"/>&lt;div class="ni" data-cat="partenariat"&gt;</text:p>
      <text:p text:style-name="Standard"><text:s text:c="6"/>&lt;span class="tag"&gt;Partenariat&lt;/span&gt;</text:p>
      <text:p text:style-name="Standard"><text:s text:c="6"/>&lt;h4&gt;Partenaire Veeam Platinum&lt;/h4&gt;</text:p>
      <text:p text:style-name="Standard"><text:s text:c="6"/>&lt;p&gt;XTech.Green atteint le niveau Platinum dans le programme partenaire Veeam, reconnaissant notre expertise en sauvegarde entreprise.&lt;/p&gt;</text:p>
      <text:p text:style-name="Standard"><text:s text:c="6"/>&lt;div class="date"&gt;Avril 2026&lt;/div&gt;</text:p>
      <text:p text:style-name="Standard"><text:s text:c="6"/>&lt;a class="read-more"&gt;Lire →&lt;/a&gt;</text:p>
      <text:p text:style-name="Standard"><text:s text:c="4"/>&lt;/div&gt;</text:p>
      <text:p text:style-name="Standard"><text:s text:c="4"/>&lt;div class="ni" data-cat="securite"&gt;</text:p>
      <text:p text:style-name="Standard"><text:s text:c="6"/>&lt;span class="tag"&gt;Sécurité&lt;/span&gt;</text:p>
      <text:p text:style-name="Standard"><text:s text:c="6"/>&lt;h4&gt;Déploiement de notre SOC interne&lt;/h4&gt;</text:p>
      <text:p text:style-name="Standard"><text:s text:c="6"/>&lt;p&gt;Mise en place d'un centre opérationnel de sécurité pour la surveillance temps réel des incidents sur les infrastructures clientes.&lt;/p&gt;</text:p>
      <text:p text:style-name="Standard"><text:s text:c="6"/>&lt;div class="date"&gt;Mars 2026&lt;/div&gt;</text:p>
      <text:p text:style-name="Standard"><text:s text:c="6"/>&lt;a class="read-more"&gt;Lire →&lt;/a&gt;</text:p>
      <text:p text:style-name="Standard"><text:s text:c="4"/>&lt;/div&gt;</text:p>
      <text:p text:style-name="Standard"><text:s text:c="4"/>&lt;div class="ni" data-cat="expansion"&gt;</text:p>
      <text:p text:style-name="Standard"><text:s text:c="6"/>&lt;span class="tag"&gt;Expansion&lt;/span&gt;</text:p>
      <text:p text:style-name="Standard"><text:s text:c="6"/>&lt;h4&gt;XTech.Green recrute 5 ingénieurs&lt;/h4&gt;</text:p>
      <text:p text:style-name="Standard"><text:s text:c="6"/>&lt;p&gt;Face à la croissance de notre activité, nous ouvrons 5 postes d'ingénieurs systèmes et réseau à Paris.&lt;/p&gt;</text:p>
      <text:p text:style-name="Standard"><text:s text:c="6"/>&lt;div class="date"&gt;Février 2026&lt;/div&gt;</text:p>
      <text:p text:style-name="Standard"><text:s text:c="6"/>&lt;a class="read-more"&gt;Lire →&lt;/a&gt;</text:p>
      <text:p text:style-name="Standard"><text:s text:c="4"/>&lt;/div&gt;</text:p>
      <text:p text:style-name="Standard"><text:s text:c="4"/>&lt;div class="ni" data-cat="partenariat"&gt;</text:p>
      <text:p text:style-name="Standard"><text:s text:c="6"/>&lt;span class="tag"&gt;Partenariat&lt;/span&gt;</text:p>
      <text:p text:style-name="Standard"><text:s text:c="6"/>&lt;h4&gt;Alliance stratégique avec Proxmox&lt;/h4&gt;</text:p>
      <text:p text:style-name="Standard"><text:s text:c="6"/>&lt;p&gt;Nouveau partenariat avec Proxmox pour proposer des formations et déploiements certifiés à nos clients.&lt;/p&gt;</text:p>
      <text:p text:style-name="Standard"><text:s text:c="6"/>&lt;div class="date"&gt;Janvier 2026&lt;/div&gt;</text:p>
      <text:p text:style-name="Standard"><text:s text:c="6"/>&lt;a class="read-more"&gt;Lire →&lt;/a&gt;</text:p>
      <text:p text:style-name="Standard"><text:s text:c="4"/>&lt;/div&gt;</text:p>
      <text:p text:style-name="Standard"><text:s text:c="4"/>&lt;div class="ni" data-cat="certification"&gt;</text:p>
      <text:p text:style-name="Standard"><text:s text:c="6"/>&lt;span class="tag"&gt;Certification&lt;/span&gt;</text:p>
      <text:p text:style-name="Standard"><text:s text:c="6"/>&lt;h4&gt;Renouvellement certification Veeam&lt;/h4&gt;</text:p>
      <text:p text:style-name="Standard"><text:s text:c="6"/>&lt;p&gt;Nos ingénieurs ont renouvelé leurs certifications Veeam Certified Engineer pour l'année 2026.&lt;/p&gt;</text:p>
      <text:p text:style-name="Standard"><text:s text:c="6"/>&lt;div class="date"&gt;Décembre 2025&lt;/div&gt;</text:p>
      <text:p text:style-name="Standard"><text:s text:c="6"/>&lt;a class="read-more"&gt;Lire →&lt;/a&gt;</text:p>
      <text:p text:style-name="Standard"><text:s text:c="4"/>&lt;/div&gt;</text:p>
      <text:p text:style-name="Standard"><text:soft-page-break/><text:s text:c="4"/>&lt;div class="ni" data-cat="securite"&gt;</text:p>
      <text:p text:style-name="Standard"><text:s text:c="6"/>&lt;span class="tag"&gt;Sécurité&lt;/span&gt;</text:p>
      <text:p text:style-name="Standard"><text:s text:c="6"/>&lt;h4&gt;Audit de sécurité pour la mairie de Lyon&lt;/h4&gt;</text:p>
      <text:p text:style-name="Standard"><text:s text:c="6"/>&lt;p&gt;Réalisation d'un audit complet de l'infrastructure réseau pour la mairie de Lyon, avec remise d'un plan de remédiation.&lt;/p&gt;</text:p>
      <text:p text:style-name="Standard"><text:s text:c="6"/>&lt;div class="date"&gt;Novembre 2025&lt;/div&gt;</text:p>
      <text:p text:style-name="Standard"><text:s text:c="6"/>&lt;a class="read-more"&gt;Lire →&lt;/a&gt;</text:p>
      <text:p text:style-name="Standard"><text:s text:c="4"/>&lt;/div&gt;</text:p>
      <text:p text:style-name="Standard"><text:s text:c="2"/>&lt;/div&gt;</text:p>
      <text:p text:style-name="Standard"><text:s text:c="2"/>&lt;div class="footer"&gt;© 2026 XTech.Green — &lt;a href="#"&gt;Mentions légales&lt;/a&gt; — contact@xtech.green&lt;/div&gt;</text:p>
      <text:p text:style-name="Standard">&lt;/div&gt;</text:p>
      <text:p text:style-name="Standard"/>
      <text:p text:style-name="Standard">&lt;script&gt;</text:p>
      <text:p text:style-name="Standard">function goTo(id){</text:p>
      <text:p text:style-name="Standard"><text:s text:c="2"/>document.querySelectorAll('.page').forEach(p=&gt;p.classList.remove('active'));</text:p>
      <text:p text:style-name="Standard"><text:s text:c="2"/>document.querySelectorAll('.nav ul a').forEach(a=&gt;a.classList.remove('active'));</text:p>
      <text:p text:style-name="Standard"><text:s text:c="2"/>document.getElementById('page-'+id).classList.add('active');</text:p>
      <text:p text:style-name="Standard"><text:s text:c="2"/>document.getElementById('nav-'+id).classList.add('active');</text:p>
      <text:p text:style-name="Standard"><text:s text:c="2"/>window.scrollTo(0,0);</text:p>
      <text:p text:style-name="Standard">}</text:p>
      <text:p text:style-name="Standard">function scrollContact(){</text:p>
      <text:p text:style-name="Standard"><text:s text:c="2"/>document.getElementById('contact').scrollIntoView({behavior:'smooth'});</text:p>
      <text:p text:style-name="Standard">}</text:p>
      <text:p text:style-name="Standard">function filterNews(cat, btn){</text:p>
      <text:p text:style-name="Standard"><text:s text:c="2"/>document.querySelectorAll('.filter-btn').forEach(b=&gt;b.classList.remove('active'));</text:p>
      <text:p text:style-name="Standard"><text:s text:c="2"/>btn.classList.add('active');</text:p>
      <text:p text:style-name="Standard"><text:s text:c="2"/>document.querySelectorAll('#news-grid .ni').forEach(ni=&gt;{</text:p>
      <text:p text:style-name="Standard"><text:s text:c="4"/>if(cat==='all'||ni.dataset.cat===cat){</text:p>
      <text:p text:style-name="Standard"><text:s text:c="6"/>ni.style.display='';</text:p>
      <text:p text:style-name="Standard"><text:s text:c="4"/>} else {</text:p>
      <text:p text:style-name="Standard"><text:s text:c="6"/>ni.style.display='none';</text:p>
      <text:p text:style-name="Standard"><text:s text:c="4"/>}</text:p>
      <text:p text:style-name="Standard"><text:s text:c="2"/>});</text:p>
      <text:p text:style-name="Standard">}</text:p>
      <text:p text:style-name="Standard"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7T10:50:20.571217100</meta:creation-date>
    <dc:date>2026-06-17T10:50:41.577452400</dc:date>
    <meta:editing-duration>PT21S</meta:editing-duration>
    <meta:editing-cycles>1</meta:editing-cycles>
    <meta:document-statistic meta:table-count="0" meta:image-count="0" meta:object-count="0" meta:page-count="11" meta:paragraph-count="435" meta:word-count="1788" meta:character-count="27605" meta:non-whitespace-character-count="24865"/>
    <meta:generator>LibreOffice/25.8.5.2$Windows_X86_64 LibreOffice_project/9c8b85f387cc00a89945a79c9e6239f32e450ac2</meta:generator>
  </office:meta>
</office:document-meta>
</file>